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svg:font-family="'Noto Serif'"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ff0000" loext:opacity="100%" style:font-name="Comic Relief" fo:font-size="36pt" officeooo:rsid="000b0503" officeooo:paragraph-rsid="000b0503" style:font-size-asian="31.5pt" style:font-size-complex="36pt"/>
    </style:style>
    <style:style style:name="P2" style:family="paragraph" style:parent-style-name="Standard">
      <style:text-properties fo:color="#81d41a" loext:opacity="100%" style:font-name="Comic Relief" fo:font-size="18pt" officeooo:rsid="000b0503" officeooo:paragraph-rsid="000b0503" style:font-size-asian="15.75pt" style:font-size-complex="18pt"/>
    </style:style>
    <style:style style:name="P3" style:family="paragraph" style:parent-style-name="Standard">
      <style:text-properties fo:color="#81d41a" loext:opacity="100%" style:font-name="Comic Relief" fo:font-size="18pt" officeooo:rsid="000bf811" officeooo:paragraph-rsid="000bf811" style:font-size-asian="15.75pt" style:font-size-complex="18pt"/>
    </style:style>
    <style:style style:name="P4" style:family="paragraph" style:parent-style-name="Standard">
      <style:text-properties fo:color="#81d41a" loext:opacity="100%" style:font-name="Comic Relief" fo:font-size="18pt" officeooo:rsid="000d81da" officeooo:paragraph-rsid="000d81da" style:font-size-asian="15.75pt" style:font-size-complex="18pt"/>
    </style:style>
    <style:style style:name="P5" style:family="paragraph" style:parent-style-name="Standard">
      <style:text-properties fo:color="#81d41a" loext:opacity="100%" style:font-name="Comic Relief" fo:font-size="18pt" officeooo:rsid="000ef24a" officeooo:paragraph-rsid="000ef24a" style:font-size-asian="15.75pt" style:font-size-complex="18pt"/>
    </style:style>
    <style:style style:name="P6" style:family="paragraph" style:parent-style-name="Standard">
      <style:text-properties fo:color="#81d41a" loext:opacity="100%" style:font-name="Comic Relief" fo:font-size="18pt" officeooo:rsid="00101757" officeooo:paragraph-rsid="00101757" style:font-size-asian="15.75pt" style:font-size-complex="18pt"/>
    </style:style>
    <style:style style:name="P7" style:family="paragraph" style:parent-style-name="Standard">
      <style:text-properties officeooo:paragraph-rsid="00101757"/>
    </style:style>
    <style:style style:name="P8" style:family="paragraph" style:parent-style-name="Standard_20_1_7e_LT_7e_Gliederung_20_1">
      <style:paragraph-properties fo:margin-left="0cm" fo:margin-right="0cm" fo:text-align="start" style:justify-single-word="false" fo:text-indent="0cm" style:auto-text-indent="false"/>
      <style:text-properties fo:color="#81d41a" loext:opacity="100%" style:font-name="Comic Relief" fo:font-size="18pt" style:font-size-asian="18pt" style:font-size-complex="18pt"/>
    </style:style>
    <style:style style:name="T1" style:family="text">
      <style:text-properties officeooo:rsid="000d81da"/>
    </style:style>
    <style:style style:name="T2" style:family="text">
      <style:text-properties fo:color="#81d41a" loext:opacity="100%" style:font-name="Comic Relief" fo:font-size="18pt" officeooo:rsid="00101757" style:font-size-asian="15.75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ES MEGA-ORAL </text:p>
      <text:p text:style-name="P1">PIZARRO:</text:p>
      <text:p text:style-name="P2">DIAPO 1(ROBIN):</text:p>
      <text:p text:style-name="P2">Francisco Pizarro est un conquistador né vers 1478 à Trujillo(actuelle Espagne) et est mort à Lima en 1541.</text:p>
      <text:p text:style-name="P3">Il est connu pour avoir conquis l’empire Inca au XVIe siècle. <text:span text:style-name="T1">Il est issu d’une famille modeste et aura plus de 50 ans lors de son expédition au Pérou.</text:span></text:p>
      <text:p text:style-name="P3">Ici, vous pouvez observer :[PRÉSENTER LE DOCUMENT]</text:p>
      <text:p text:style-name="P3"/>
      <text:p text:style-name="P3">DIAPO 2(ILYES):</text:p>
      <text:p text:style-name="P3">Nous pouvons ici observer une carte qui pour[PRÉSENTER LE DOCUMENT]</text:p>
      <text:p text:style-name="P3">Et qui a pour sujet les conquêtes de Pizarro face à l’empire Inca. <text:span text:style-name="T1">Je m’explique:</text:span></text:p>
      <text:p text:style-name="P4">Comme on peut le voir ici, Pizarro accoste pour la première fois sur les rivages du Pérou car L'empereur Charles Quint lui demande de prendre possession de ces terres nouvelles. De l'or et de l'émeraude s’y trouve,là ou vivent les Incas. D’ailleurs, les expéditions précédentes se soldèrent par des échecs désastreux arrivés à peine sur la côte.Lors de cette première expédition,les conditions étaient difficiles et les habitants locaux, les Incas étaient très nombreux.</text:p>
      <text:p text:style-name="P4">Les hommes de Pizarro commencent à piller des villages et à récupérer de l’or.</text:p>
      <text:p text:style-name="P4"/>
      <text:p text:style-name="P5"><text:soft-page-break/>Dans cette civilisation, les deux fils du roi décédé se battent pour le pouvoir.</text:p>
      <text:p text:style-name="P5"/>
      <text:p text:style-name="P5">Pizarro fait croire qu'il vient en paix et est invité par Atahualpa, le fils ayant obtenu le pouvoir pour se rencontrer et être amis sous conditions qu'il rende toutes les richesses pillées.</text:p>
      <text:p text:style-name="P5">Pizarro accepte mais a un plan derrière la tête.</text:p>
      <text:p text:style-name="P5"/>
      <text:p text:style-name="P5">DIAPO 3 (ROBIN):</text:p>
      <text:p text:style-name="P5">Ici, on peut voir: [PRÉSENTER LE DOC].</text:p>
      <text:p text:style-name="P5">Voici une explication du sujet du document:</text:p>
      <text:p text:style-name="P5">Pizarro avait en fait envoyé avant le rendez vous beaucoup de soldats à Cuzco, la capitale de l’empire Inca ou était invité Pizarro ets es hommes.Au moment du rendez-vous, ce fut un massacre , beaucoup mourrurent et le chef fut capturé, même à 200 contre 5000, les Incas se sont fait anéantir par les espagnols et Cuzco était à présent sous le contrôle des espagnols.</text:p>
      <text:p text:style-name="P6">Pizarro récupère des tonnes d’or et de richesses.</text:p>
      <text:p text:style-name="P6">Il devait se dépêcher car d’autres explorateurs arriveraient et lui voleraient ses richesses.</text:p>
      <text:p text:style-name="P6">Huazcar, frère de Atah est tué par ses espions et Atahualpa sera condamné à mort.Les richesses furent réparties pour l’empereur, Pizarro, Almagro et leurs hommes. Des années plus tard, la rivalité entre lui et un autre explorateur du nom de Almagro causera sa perte.</text:p>
      <text:p text:style-name="P6"/>
      <text:p text:style-name="P6"/>
      <text:p text:style-name="P7"><text:soft-page-break/><text:span text:style-name="T2">DIAPO 4 (ILYES): Conclusion: En quoi Pizarro a-t-il changé le monde? Quelles traces a-t-il laissé?</text:span></text:p>
      <text:p text:style-name="P8">Son action a profondément modifié l'histoire de l'Amérique du Sud et renforcé la puissance de l'Espagne mais a selon nous laissé surtout un impact négatif, massacrant et tuant des milliers d’êtres humains seulement dans le but d’obtenir des richesse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svg:font-family="'Noto Serif'"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1_7e_LT_7e_Gliederung_20_1" style:display-name="Standard 1~LT~Gliederung 1" style:family="paragraph">
      <style:paragraph-properties fo:margin-top="0cm" fo:margin-bottom="0.499cm" style:contextual-spacing="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Noto Serif" style:font-family-asian="'Noto Serif'"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2.2$Linux_X86_64 LibreOffice_project/520$Build-2</meta:generator>
    <dc:date>2026-06-02T20:52:10.355584121</dc:date>
    <meta:editing-duration>PT13M51S</meta:editing-duration>
    <meta:editing-cycles>1</meta:editing-cycles>
    <meta:document-statistic meta:table-count="0" meta:image-count="0" meta:object-count="0" meta:page-count="3" meta:paragraph-count="23" meta:word-count="429" meta:character-count="2598" meta:non-whitespace-character-count="2191"/>
  </office:meta>
</office:document-meta>
</file>